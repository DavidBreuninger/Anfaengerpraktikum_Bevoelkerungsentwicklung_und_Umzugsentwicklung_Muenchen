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fo:line-height="150%"/>
      <style:text-properties style:font-name="Aptos Display" fo:font-weight="bold" style:font-weight-asian="bold" style:font-weight-complex="bold"/>
    </style:style>
    <style:style style:name="P2" style:parent-style-name="Standard" style:family="paragraph">
      <style:paragraph-properties fo:line-height="150%"/>
      <style:text-properties style:font-name="Aptos Display" fo:font-weight="bold" style:font-weight-asian="bold" style:font-weight-complex="bold"/>
    </style:style>
    <style:style style:name="P3" style:parent-style-name="Standard" style:family="paragraph">
      <style:paragraph-properties fo:line-height="150%"/>
      <style:text-properties style:font-name="Aptos Display"/>
    </style:style>
    <style:style style:name="P4" style:parent-style-name="Standard" style:family="paragraph">
      <style:paragraph-properties fo:line-height="150%"/>
      <style:text-properties style:font-name="Aptos Display" fo:font-weight="bold" style:font-weight-asian="bold" style:font-weight-complex="bold"/>
    </style:style>
    <style:style style:name="P5" style:parent-style-name="Standard" style:family="paragraph">
      <style:paragraph-properties fo:line-height="150%"/>
      <style:text-properties style:font-name="Aptos Display"/>
    </style:style>
    <style:style style:name="P6" style:parent-style-name="Standard" style:family="paragraph">
      <style:paragraph-properties fo:line-height="150%"/>
      <style:text-properties style:font-name="Aptos Display" fo:font-weight="bold" style:font-weight-asian="bold" style:font-weight-complex="bold"/>
    </style:style>
    <style:style style:name="P7" style:parent-style-name="Standard" style:family="paragraph">
      <style:paragraph-properties fo:line-height="150%"/>
      <style:text-properties style:font-name="Aptos Display"/>
    </style:style>
    <style:style style:name="P8" style:parent-style-name="Standard" style:family="paragraph">
      <style:paragraph-properties fo:line-height="150%"/>
      <style:text-properties style:font-name="Aptos Display" fo:font-weight="bold" style:font-weight-asian="bold" style:font-weight-complex="bold"/>
    </style:style>
    <style:style style:name="P9" style:parent-style-name="Standard" style:family="paragraph">
      <style:paragraph-properties fo:line-height="150%"/>
    </style:style>
    <style:style style:name="T10" style:parent-style-name="Absatz-Standardschriftart" style:family="text">
      <style:text-properties style:font-name="Aptos Display"/>
    </style:style>
    <style:style style:name="T11" style:parent-style-name="Absatz-Standardschriftart" style:family="text">
      <style:text-properties style:font-name="Aptos Display"/>
    </style:style>
    <style:style style:name="T12" style:parent-style-name="Absatz-Standardschriftart" style:family="text">
      <style:text-properties style:font-name="Aptos Display"/>
    </style:style>
    <style:style style:name="T13" style:parent-style-name="Absatz-Standardschriftart" style:family="text">
      <style:text-properties style:font-name="Aptos Display"/>
    </style:style>
  </office:automatic-styles>
  <office:body>
    <office:text text:use-soft-page-breaks="true">
      <text:p text:style-name="P1">Bericht</text:p>
      <text:p text:style-name="P2">Daten</text:p>
      <text:p text:style-name="P3">Die vorliegenden Daten erfassen Informationen zum Bevölkerungsstand und den Umzügen in der Stadt München und ihren 25 Stadtbezirken. Die erfasste Zeitspanne beginnt mit folgenden Jahren 2000/2002/2005 und endet immer mit<text:s/>dem Jahr 2024.</text:p>
      <text:p text:style-name="P4">Fragestellung</text:p>
      <text:p text:style-name="P5">Die Fragestellung umfasst den zeitlichen Verlauf der Bevölkerung und der Zu – und Wegzüge in den 25 Stadtbezirken.</text:p>
      <text:p text:style-name="P6">Bevölkerungsentwicklung</text:p>
      <text:p text:style-name="P7">Die Bevölkerung der Stadt München in den letzten 20 Jahren ist gestiegen, besonders deutlich bei den nichtdeutschen Staatsbürgern. Die Bevölkerungsentwicklung unterscheidet sich deutlich in den verschiedenen Stadtbezirken. So haben einige Stadtbezirke seit ca. 2016 eine stagnierende bzw. sogar leicht sinkende Bevölkerungsentwicklung. Dies betrifft tendenziell eher Stadtbezirke mit einer bereits hohen Bevölkerungsdichte. <text:s/></text:p>
      <text:p text:style-name="P8">Wohnmobilität</text:p>
      <text:p text:style-name="P9"><text:span text:style-name="T10">Die Mobilitätsziffer ist auf einen leicht sinkenden Trend in den letzten 20 Jahren. Besonders innerstädtische Umzüge haben einen prozentualen Rückgang zu verzeichnen. Die Mobilitätsziffer der nicht deutschen Staatsbürgern ist deutlich höher als der den deutschen Staatsbürgern. Nicht deutsche Staatsbürger ziehen prozentual deutlich öfters weg, sowohl innerstädtisch als auch außerstädtisch als deutsche Staatsbürger. Es gibt 2 Stadtbezirke mit ausfälligen Ausreißern bei den nichtdeutschen<text:s/></text:span><text:span text:style-name="T11">absoluten<text:s/></text:span><text:span text:style-name="T12">Zu – und Wegzügen. Einmal Thalkirchen im Jahr 2013 und Schwabing-Freimann in den letzten betrachteten Jahren, wo ein deutlicherer und langfristigerer Ausreißer erkennbar ist. Mit zunehmendem zeitlichem Verlauf ist erkennbar, dass sich der Anteil der nichtdeutschen Zu- und Wegzüge an den insgesamten Zu – und Wegzüge erhöht, während folgerichtiger der Anteil der deutschen Zu – und Wegzüge an den insgesamten Zu – und Wegzüge sinkt. Insgesamt ziehen seit 2013 deutlich mehr deutsche Staatsbürger aus München weg<text:s/></text:span><text:span text:style-name="T13">als nach München, was durch das Umgekehrte Verhalten der nicht deutschen Staatsbürger ein kaschiert wird, sodass es zu einem Nettozuzug komm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Breuninger</meta:initial-creator>
    <dc:creator>David Breuninger</dc:creator>
    <meta:creation-date>2026-03-17T22:15:00Z</meta:creation-date>
    <dc:date>2026-04-15T10:11:00Z</dc:date>
    <meta:template xlink:href="Normal" xlink:type="simple"/>
    <meta:editing-cycles>13</meta:editing-cycles>
    <meta:editing-duration>PT0S</meta:editing-duration>
    <meta:document-statistic meta:page-count="1" meta:paragraph-count="3" meta:word-count="273" meta:character-count="1996" meta:row-count="14" meta:non-whitespace-character-count="1726"/>
  </office:meta>
</office:document-meta>
</file>