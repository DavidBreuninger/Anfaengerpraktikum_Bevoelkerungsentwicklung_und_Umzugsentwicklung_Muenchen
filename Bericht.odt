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Standard" style:master-page-name="MP0" style:family="paragraph">
      <style:paragraph-properties fo:break-before="page" fo:line-height="150%"/>
      <style:text-properties fo:font-weight="bold" style:font-weight-asian="bold" style:font-weight-complex="bold" fo:font-size="11pt" style:font-size-asian="11pt" style:font-size-complex="11pt"/>
    </style:style>
    <style:style style:name="P2" style:parent-style-name="Standard" style:family="paragraph">
      <style:paragraph-properties fo:line-height="150%"/>
      <style:text-properties fo:font-weight="bold" style:font-weight-asian="bold" style:font-weight-complex="bold" fo:font-size="11pt" style:font-size-asian="11pt" style:font-size-complex="11pt"/>
    </style:style>
    <style:style style:name="P3" style:parent-style-name="Standard" style:family="paragraph">
      <style:paragraph-properties fo:line-height="150%"/>
      <style:text-properties fo:font-size="11pt" style:font-size-asian="11pt" style:font-size-complex="11pt"/>
    </style:style>
    <style:style style:name="P4" style:parent-style-name="Standard" style:family="paragraph">
      <style:paragraph-properties fo:line-height="150%"/>
      <style:text-properties fo:font-weight="bold" style:font-weight-asian="bold" style:font-weight-complex="bold" fo:font-size="11pt" style:font-size-asian="11pt" style:font-size-complex="11pt"/>
    </style:style>
    <style:style style:name="P5" style:parent-style-name="Standard" style:family="paragraph">
      <style:paragraph-properties fo:line-height="150%"/>
      <style:text-properties fo:font-size="11pt" style:font-size-asian="11pt" style:font-size-complex="11pt"/>
    </style:style>
    <style:style style:name="P6" style:parent-style-name="Standard" style:family="paragraph">
      <style:paragraph-properties fo:line-height="150%"/>
      <style:text-properties fo:font-weight="bold" style:font-weight-asian="bold" style:font-weight-complex="bold" fo:font-size="11pt" style:font-size-asian="11pt" style:font-size-complex="11pt"/>
    </style:style>
    <style:style style:name="P7" style:parent-style-name="Standard" style:family="paragraph">
      <style:paragraph-properties fo:line-height="150%"/>
      <style:text-properties fo:font-size="11pt" style:font-size-asian="11pt" style:font-size-complex="11pt"/>
    </style:style>
    <style:style style:name="P8" style:parent-style-name="Standard" style:family="paragraph">
      <style:paragraph-properties fo:line-height="150%"/>
      <style:text-properties fo:font-weight="bold" style:font-weight-asian="bold" style:font-weight-complex="bold" fo:font-size="11pt" style:font-size-asian="11pt" style:font-size-complex="11pt"/>
    </style:style>
    <style:style style:name="P9" style:parent-style-name="Standard" style:family="paragraph">
      <style:paragraph-properties fo:line-height="150%"/>
      <style:text-properties fo:font-size="11pt" style:font-size-asian="11pt" style:font-size-complex="11pt"/>
    </style:style>
    <style:style style:name="P10" style:parent-style-name="Standard" style:family="paragraph">
      <style:paragraph-properties fo:line-height="150%"/>
      <style:text-properties fo:font-size="11pt" style:font-size-asian="11pt" style:font-size-complex="11pt"/>
    </style:style>
  </office:automatic-styles>
  <office:body>
    <office:text text:use-soft-page-breaks="true">
      <text:p text:style-name="P1">Bericht</text:p>
      <text:p text:style-name="P2">Daten</text:p>
      <text:p text:style-name="P3">Die vorliegenden Daten erfassen Informationen zum Bevölkerungsstand und den Umzügen in der Stadt München und ihren 25 Stadtbezirken. Die erfasste Zeitspanne beginnt je nach Daten mit einem der folgenden Jahren 2000, 2002<text:s/>oder 2005 und endet immer mit dem Jahr 2024.</text:p>
      <text:p text:style-name="P4">Fragestellung</text:p>
      <text:p text:style-name="P5">Die Fragestellung umfasst die zeitliche Entwicklung der Bevölkerung und der Zu – und Wegzüge in den 25 Stadtbezirken. Die zentralen Entwicklungen und Auffälligkeiten werden im Folgenden beschrieben.</text:p>
      <text:p text:style-name="P6">Bevölkerungsentwicklung</text:p>
      <text:p text:style-name="P7">Die Bevölkerung der Stadt München in den letzten 20 Jahren ist gestiegen, besonders deutlich bei den nichtdeutschen Staatsbürgern. Die Bevölkerungsentwicklung unterscheidet sich deutlich in den verschiedenen Stadtbezirken. So haben<text:s/>viele<text:s/>Stadtbezirke seit ca. 2016 eine stagnierende bzw. sogar leicht sinkende Bevölkerungsentwicklung. Dies betrifft tendenziell eher Stadtbezirke mit einer bereits hohen Bevölkerungsdichte. <text:s/></text:p>
      <text:p text:style-name="P8">Wohnmobilität</text:p>
      <text:p text:style-name="P9">Die Mobilitätsziffer ist auf einen leicht sinkenden Trend in den letzten 20 Jahren. Besonders innerstädtische Umzüge haben einen prozentualen Rückgang zu verzeichnen. Die Mobilitätsziffer der nicht deutschen Staatsbürgern ist deutlich höher als der den deutschen Staatsbürgern. Nicht deutsche Staatsbürger ziehen prozentual deutlich öfters weg, sowohl innerstädtisch als auch außerstädtisch als deutsche Staatsbürger. Die Zu – und Wegzüge der deutschen Staatsbürger sind relativ stabil in dem Sinne, dass es keinen großen Ausreißer gibt, während es hin und wieder bei dem nichtdeutschen Ausreißer erkennbar sind. Auffällig ist<text:s/>der Stadtbezirk<text:s/>Thalkirchen im Jahr 2013 und Schwabing-Freimann in den letzten betrachteten Jahren, wo ein deutlicherer und langfristigerer Ausreißer erkennbar ist. Insgesamt ziehen seit 2013 deutlich mehr deutsche Staatsbürger aus München weg als nach München, was durch das Umgekehrte Verhalten der nicht deutschen Staatsbürger ein kaschiert wird, sodass es in fast allen Jahren zu einem insgesamten positiven Nettoumzug kommt. Das heißt, dass in den meisten betrachteten Jahren der Zuzug in die Stadt München höher war als der Wegzug. Besonders herausstechend ist das Jahr 2017 mit einem deutlich negativen Nettoumzug, wo es ein hoher Wegzug von nichtdeutschen Staatsbürgern gab.</text:p>
      <text:p text:style-name="P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vid Breuninger</meta:initial-creator>
    <dc:creator>David Breuninger</dc:creator>
    <meta:creation-date>2026-03-17T22:15:00Z</meta:creation-date>
    <dc:date>2026-04-15T17:14:00Z</dc:date>
    <meta:template xlink:href="Normal" xlink:type="simple"/>
    <meta:editing-cycles>18</meta:editing-cycles>
    <meta:editing-duration>PT0S</meta:editing-duration>
    <meta:document-statistic meta:page-count="1" meta:paragraph-count="4" meta:word-count="310" meta:character-count="2263" meta:row-count="16" meta:non-whitespace-character-count="1957"/>
  </office:meta>
</office:document-meta>
</file>