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office:automatic-styles>
  <office:body>
    <office:text text:use-soft-page-breaks="true">
      <text:p text:style-name="P1">Bericht</text:p>
      <text:p text:style-name="P2"/>
      <text:p text:style-name="P3">Datensätze</text:p>
      <text:p text:style-name="Standard">Der Datensatz Bevölkerungsdichte hat die Variablen Hauptwohnsitzbevölkerung und Fläche in Quadratmeter und die Bevölkerungsdichte für die 25 Stadtbezirke und Gesamtmünchen von den Jahren von 2002 bis 2024.<text:s/></text:p>
      <text:p text:style-name="Standard">Der<text:s/>Datensatz Mobilitätsziffer hat die Variablen Mobilitätsziffer, welche ausdrückt wie viele Menschen pro 1000 Einwohner innerhalb eines räumlichen Gebiets umgezogen sind, Basiswert 1 bis Basiswert 5 und Ausprägung von Jahr 2000 bis 2024. Die Ausprägung bezieht sich auf die Staatsbürgerschaft und liegt im Datensatz in 3 möglichen Ausprägungen vor: deutsch, nicht deutsch und insgesamt, während im Bevölkerungsdichtedatensatz nur insgesamt vorliegt. Basiswert 5 ist die mittlere Wohnsitzbevölkerung während Basiswert 1 bis 4 jeweils für außerstädtische Zugezogene, innerstädtische Zugezogene, außerstädtische Weggezogene und innerstädtische Weggezogene.<text:s/></text:p>
      <text:p text:style-name="Standard"/>
      <text:p text:style-name="P4">Bevölkerungsentwicklung</text:p>
      <text:p text:style-name="Standard">Der Trend der Bevölkerungsentwicklung der letzten 20 Jahre in München ist ganz klar steigend. Die Bevölkerungsentwicklung unterscheidet sich deutlich in den verschiedenen Stadtbezirken. So haben einige Stadtbezirke seit ca. 2016 eine stagnierende bzw. sogar leicht sinkende Bevölkerungsentwicklung. Dies betrifft tendenziell eher Stadtbezirke mit einer bereits hohen Bevölkerungsdichte. <text:s/></text:p>
      <text:p text:style-name="Standard"/>
      <text:p text:style-name="P5">Wohnmobilität</text:p>
      <text:p text:style-name="Standard">Die Mobilitätsziffer ist auf einen leicht sinkenden Trend in den letzten 20 Jahren. Besonders innerstädtische Umzüge haben einen prozentualen Rückgang zu verzeichnen. Die Mobilitätsziffer der nicht deutschen Staatsbürgern ist deutlich höher als der den deutschen Staatsbürgern. Nicht deutsche Staatsbürger ziehen prozentual deutlich öfters weg, sowohl innerstädtisch als auch außerstädtisch als deutsche Staatsbürger.<text:s/>Es gibt 2 Stadtbezirke mit ausfälligen Ausreißern bei den nichtdeutschen Zu – und Wegzügen. Einmal Thalkirchen nur in einem Jahr und Schwabing-Freimann wo es eine deutlichere und langfristigere Auswirkung vorliegt.<text:s/>Insgesamt ziehen seit über 10 Jahren deutlich mehr deutsche Staatsbürger aus München weg als nach München, was durch das Umgekehrte Verhalten der nicht deutschen Staatsbürger ein kaschiert wird, sodass es zu einem Nettozuzug kommt.<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 Breuninger</meta:initial-creator>
    <dc:creator>David Breuninger</dc:creator>
    <meta:creation-date>2026-03-17T22:15:00Z</meta:creation-date>
    <dc:date>2026-04-09T11:57:00Z</dc:date>
    <meta:template xlink:href="Normal" xlink:type="simple"/>
    <meta:editing-cycles>6</meta:editing-cycles>
    <meta:editing-duration>PT0S</meta:editing-duration>
    <meta:document-statistic meta:page-count="1" meta:paragraph-count="4" meta:word-count="298" meta:character-count="2176" meta:row-count="15" meta:non-whitespace-character-count="1882"/>
  </office:meta>
</office:document-meta>
</file>